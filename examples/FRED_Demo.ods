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3.5429in"/>
    </style:style>
    <style:style style:name="co3" style:family="table-column">
      <style:table-column-properties fo:break-before="auto" style:column-width="1.378in"/>
    </style:style>
    <style:style style:name="co4" style:family="table-column">
      <style:table-column-properties fo:break-before="auto" style:column-width="1.5752in"/>
    </style:style>
    <style:style style:name="co5" style:family="table-column">
      <style:table-column-properties fo:break-before="auto" style:column-width="1.18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>
      <style:table-cell-properties fo:background-color="#dce6f1"/>
      <style:text-properties fo:font-weight="bold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fo:background-color="#fff2cc"/>
    </style:style>
    <style:style style:name="ce5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 table:null-year="1950"/>
      <table:table table:name="FRED Dem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RED Calc Add-In — Dem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ve economic data via FRED.VALUE() / FRED.DESCRIPTION() (paste your key below, or set FRED_API_KEY for LibreOffice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our FRED API key (optional; overrides FRED_API_KEY):</text:p>
          </table:table-cell>
          <table:table-cell table:style-name="ce4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Series ID</text:p>
          </table:table-cell>
          <table:table-cell table:style-name="ce2" office:value-type="string" calcext:value-type="string">
            <text:p>Title (FRED.DESCRIPTION)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Latest Value (FRED.VALUE)</text:p>
          </table:table-cell>
          <table:table-cell table:style-name="ce2" office:value-type="string" calcext:value-type="string">
            <text:p>Last Updated</text:p>
          </table:table-cell>
        </table:table-row>
        <table:table-row table:style-name="ro2">
          <table:table-cell office:value-type="string" calcext:value-type="string">
            <text:p>GDP</text:p>
          </table:table-cell>
          <table:table-cell table:formula="of:=COM.EXAMPLE.FRED.FREDIMPL.DESCRIPTION([.$A6];&quot;title&quot;;[.$B$3])" office:value-type="string" office:string-value="" calcext:value-type="error">
            <text:p>#VALUE!</text:p>
          </table:table-cell>
          <table:table-cell table:formula="of:=COM.EXAMPLE.FRED.FREDIMPL.DESCRIPTION([.$A6];&quot;units&quot;;[.$B$3])" office:value-type="string" office:string-value="" calcext:value-type="error">
            <text:p>#VALUE!</text:p>
          </table:table-cell>
          <table:table-cell table:formula="of:=COM.EXAMPLE.FRED.FREDIMPL.DESCRIPTION([.$A6];&quot;frequency&quot;;[.$B$3])" office:value-type="string" office:string-value="" calcext:value-type="error">
            <text:p>#VALUE!</text:p>
          </table:table-cell>
          <table:table-cell table:formula="of:=COM.EXAMPLE.FRED.FREDIMPL.VALUE([.$A6];;[.$B$3])" office:value-type="string" office:string-value="" calcext:value-type="error">
            <text:p>#VALUE!</text:p>
          </table:table-cell>
          <table:table-cell table:formula="of:=COM.EXAMPLE.FRED.FREDIMPL.DESCRIPTION([.$A6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UNRATE</text:p>
          </table:table-cell>
          <table:table-cell table:formula="of:=COM.EXAMPLE.FRED.FREDIMPL.DESCRIPTION([.$A7];&quot;title&quot;;[.$B$3])" office:value-type="string" office:string-value="" calcext:value-type="error">
            <text:p>#VALUE!</text:p>
          </table:table-cell>
          <table:table-cell table:formula="of:=COM.EXAMPLE.FRED.FREDIMPL.DESCRIPTION([.$A7];&quot;units&quot;;[.$B$3])" office:value-type="string" office:string-value="" calcext:value-type="error">
            <text:p>#VALUE!</text:p>
          </table:table-cell>
          <table:table-cell table:formula="of:=COM.EXAMPLE.FRED.FREDIMPL.DESCRIPTION([.$A7];&quot;frequency&quot;;[.$B$3])" office:value-type="string" office:string-value="" calcext:value-type="error">
            <text:p>#VALUE!</text:p>
          </table:table-cell>
          <table:table-cell table:formula="of:=COM.EXAMPLE.FRED.FREDIMPL.VALUE([.$A7];;[.$B$3])" office:value-type="string" office:string-value="" calcext:value-type="error">
            <text:p>#VALUE!</text:p>
          </table:table-cell>
          <table:table-cell table:formula="of:=COM.EXAMPLE.FRED.FREDIMPL.DESCRIPTION([.$A7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CPIAUCSL</text:p>
          </table:table-cell>
          <table:table-cell table:formula="of:=COM.EXAMPLE.FRED.FREDIMPL.DESCRIPTION([.$A8];&quot;title&quot;;[.$B$3])" office:value-type="string" office:string-value="" calcext:value-type="error">
            <text:p>#VALUE!</text:p>
          </table:table-cell>
          <table:table-cell table:formula="of:=COM.EXAMPLE.FRED.FREDIMPL.DESCRIPTION([.$A8];&quot;units&quot;;[.$B$3])" office:value-type="string" office:string-value="" calcext:value-type="error">
            <text:p>#VALUE!</text:p>
          </table:table-cell>
          <table:table-cell table:formula="of:=COM.EXAMPLE.FRED.FREDIMPL.DESCRIPTION([.$A8];&quot;frequency&quot;;[.$B$3])" office:value-type="string" office:string-value="" calcext:value-type="error">
            <text:p>#VALUE!</text:p>
          </table:table-cell>
          <table:table-cell table:formula="of:=COM.EXAMPLE.FRED.FREDIMPL.VALUE([.$A8];;[.$B$3])" office:value-type="string" office:string-value="" calcext:value-type="error">
            <text:p>#VALUE!</text:p>
          </table:table-cell>
          <table:table-cell table:formula="of:=COM.EXAMPLE.FRED.FREDIMPL.DESCRIPTION([.$A8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FEDFUNDS</text:p>
          </table:table-cell>
          <table:table-cell table:formula="of:=COM.EXAMPLE.FRED.FREDIMPL.DESCRIPTION([.$A9];&quot;title&quot;;[.$B$3])" office:value-type="string" office:string-value="" calcext:value-type="error">
            <text:p>#VALUE!</text:p>
          </table:table-cell>
          <table:table-cell table:formula="of:=COM.EXAMPLE.FRED.FREDIMPL.DESCRIPTION([.$A9];&quot;units&quot;;[.$B$3])" office:value-type="string" office:string-value="" calcext:value-type="error">
            <text:p>#VALUE!</text:p>
          </table:table-cell>
          <table:table-cell table:formula="of:=COM.EXAMPLE.FRED.FREDIMPL.DESCRIPTION([.$A9];&quot;frequency&quot;;[.$B$3])" office:value-type="string" office:string-value="" calcext:value-type="error">
            <text:p>#VALUE!</text:p>
          </table:table-cell>
          <table:table-cell table:formula="of:=COM.EXAMPLE.FRED.FREDIMPL.VALUE([.$A9];;[.$B$3])" office:value-type="string" office:string-value="" calcext:value-type="error">
            <text:p>#VALUE!</text:p>
          </table:table-cell>
          <table:table-cell table:formula="of:=COM.EXAMPLE.FRED.FREDIMPL.DESCRIPTION([.$A9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DGS10</text:p>
          </table:table-cell>
          <table:table-cell table:formula="of:=COM.EXAMPLE.FRED.FREDIMPL.DESCRIPTION([.$A10];&quot;title&quot;;[.$B$3])" office:value-type="string" office:string-value="" calcext:value-type="error">
            <text:p>#VALUE!</text:p>
          </table:table-cell>
          <table:table-cell table:formula="of:=COM.EXAMPLE.FRED.FREDIMPL.DESCRIPTION([.$A10];&quot;units&quot;;[.$B$3])" office:value-type="string" office:string-value="" calcext:value-type="error">
            <text:p>#VALUE!</text:p>
          </table:table-cell>
          <table:table-cell table:formula="of:=COM.EXAMPLE.FRED.FREDIMPL.DESCRIPTION([.$A10];&quot;frequency&quot;;[.$B$3])" office:value-type="string" office:string-value="" calcext:value-type="error">
            <text:p>#VALUE!</text:p>
          </table:table-cell>
          <table:table-cell table:formula="of:=COM.EXAMPLE.FRED.FREDIMPL.VALUE([.$A10];;[.$B$3])" office:value-type="string" office:string-value="" calcext:value-type="error">
            <text:p>#VALUE!</text:p>
          </table:table-cell>
          <table:table-cell table:formula="of:=COM.EXAMPLE.FRED.FREDIMPL.DESCRIPTION([.$A10];&quot;last_updated&quot;;[.$B$3]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PAYEMS</text:p>
          </table:table-cell>
          <table:table-cell table:formula="of:=COM.EXAMPLE.FRED.FREDIMPL.DESCRIPTION([.$A11];&quot;title&quot;;[.$B$3])" office:value-type="string" office:string-value="" calcext:value-type="error">
            <text:p>#VALUE!</text:p>
          </table:table-cell>
          <table:table-cell table:formula="of:=COM.EXAMPLE.FRED.FREDIMPL.DESCRIPTION([.$A11];&quot;units&quot;;[.$B$3])" office:value-type="string" office:string-value="" calcext:value-type="error">
            <text:p>#VALUE!</text:p>
          </table:table-cell>
          <table:table-cell table:formula="of:=COM.EXAMPLE.FRED.FREDIMPL.DESCRIPTION([.$A11];&quot;frequency&quot;;[.$B$3])" office:value-type="string" office:string-value="" calcext:value-type="error">
            <text:p>#VALUE!</text:p>
          </table:table-cell>
          <table:table-cell table:formula="of:=COM.EXAMPLE.FRED.FREDIMPL.VALUE([.$A11];;[.$B$3])" office:value-type="string" office:string-value="" calcext:value-type="error">
            <text:p>#VALUE!</text:p>
          </table:table-cell>
          <table:table-cell table:formula="of:=COM.EXAMPLE.FRED.FREDIMPL.DESCRIPTION([.$A11];&quot;last_updated&quot;;[.$B$3])" office:value-type="string" office:string-value="" calcext:value-type="error">
            <text:p>#VALUE!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" office:value-type="string" calcext:value-type="string">
            <text:p>As-of-date lookup: FRED.VALUE(series_id; date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DP</text:p>
          </table:table-cell>
          <table:table-cell office:value-type="string" calcext:value-type="string">
            <text:p>as of</text:p>
          </table:table-cell>
          <table:table-cell table:style-name="ce5" table:formula="of:=DATE(2020;1;1)" office:value-type="date" office:date-value="2020-01-01" calcext:value-type="date">
            <text:p>2020-01-01</text:p>
          </table:table-cell>
          <table:table-cell table:formula="of:=COM.EXAMPLE.FRED.FREDIMPL.VALUE([.$A15];[.$C15];[.$B$3])" office:value-type="string" office:string-value="" calcext:value-type="error">
            <text:p>#VALUE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4T18:16:08.718687300</meta:creation-date>
    <dc:date>2026-07-04T18:16:21.811213912</dc:date>
    <meta:editing-duration>PT15S</meta:editing-duration>
    <meta:editing-cycles>1</meta:editing-cycles>
    <meta:document-statistic meta:table-count="1" meta:cell-count="50" meta:object-count="0"/>
    <meta:generator>LibreOffice/26.2.4.2$Linux_X86_64 LibreOffice_project/620$Build-2</meta:generator>
  </office:meta>
</office:document-meta>
</file>